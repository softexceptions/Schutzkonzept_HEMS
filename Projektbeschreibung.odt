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5666" officeooo:paragraph-rsid="00145666"/>
    </style:style>
    <style:style style:name="P2" style:family="paragraph" style:parent-style-name="Standard">
      <style:text-properties style:text-line-through-style="none" style:text-line-through-type="none" style:font-name="Google Sans" fo:font-size="15pt" style:text-underline-style="none" fo:font-weight="bold" officeooo:rsid="00145666" officeooo:paragraph-rsid="00145666" style:text-blinking="false" loext:padding="0cm" loext:border="none"/>
    </style:style>
    <style:style style:name="P3"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2pt" style:text-underline-style="none" fo:font-weight="bold" style:text-blinking="false" loext:padding="0cm" loext:border="none"/>
    </style:style>
    <style:style style:name="P4"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officeooo:rsid="00145666"/>
    </style:style>
    <style:style style:name="P5"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2pt" style:text-underline-style="none" fo:font-weight="bold" officeooo:rsid="00145666" style:text-blinking="false" loext:padding="0cm" loext:border="none"/>
    </style:style>
    <style:style style:name="P6"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officeooo:rsid="00145666"/>
    </style:style>
    <style:style style:name="P7"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officeooo:rsid="00145666" style:text-blinking="false" loext:padding="0cm" loext:border="none"/>
    </style:style>
    <style:style style:name="P8"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officeooo:rsid="00145666" style:text-blinking="false" loext:padding="0cm" loext:border="none"/>
    </style:style>
    <style:style style:name="P9"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officeooo:rsid="00145666"/>
    </style:style>
    <style:style style:name="P10"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officeooo:rsid="00145666" style:text-blinking="false" loext:padding="0cm" loext:border="none"/>
    </style:style>
    <style:style style:name="P11"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officeooo:rsid="00145666"/>
    </style:style>
    <style:style style:name="T1" style:family="text">
      <style:text-properties officeooo:rsid="00160cef"/>
    </style:style>
    <style:style style:name="T2" style:family="text">
      <style:text-properties officeooo:rsid="00180459"/>
    </style:style>
    <style:style style:name="T3" style:family="text">
      <style:text-properties style:text-line-through-style="none" style:text-line-through-type="none" style:font-name="Google Sans" fo:font-size="12pt" style:text-underline-style="none" fo:font-weight="bold" style:text-blinking="false" loext:padding="0cm" loext:border="none"/>
    </style:style>
    <style:style style:name="T4" style:family="text">
      <style:text-properties style:text-line-through-style="none" style:text-line-through-type="none" style:font-name="Google Sans" fo:font-size="12pt" style:text-underline-style="none" fo:font-weight="normal" style:text-blinking="false"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es dir bitte das Schulkonzept Schutzkonzept_HEMS_03-05-26-v2.<text:span text:style-name="T1">pdf</text:span> im aktuellen Verzeichnis durch. Alle Schulen sind verpflichtet, bis Sommer ein schulisches Präventationskonzept (Schutzkonzept gegen sexualisierte Gewalt) zu erarbeiten. Dieses Schulkonzept soll uns Lehrkräften in erster Linie Orientierung geben und konkrete Handlungsmöglichkeiten aufzuzeigen. Unser Ziel ist es, das Schutzkonzept auf Basis unserer gemeinsamen Werte – insbesondere Respekt, Achtsamkeit und Verantwortung – mit Leben zu füllen. Das vorliegende Konzept erfüllt zunächst die notwendigen Minimalanforderungen. Gleichzeitig verstehen wir es ausdrücklich als „lebendes Dokument“, das kontinuierlich weiterentwickelt, konkretisiert und angepasst werden kann. <text:span text:style-name="T1">Wir erstellen gemeinsam eine Web-Page (Landig-Page) mit guter handhabbarkeit für dieses Thema. Die Inhalte sollen editierbar sein, so dass diese angepasst, bzw. erweitert werden können. Als Erweiterung ist folgendes geplant, was aber erst später hinzugefügt werden soll jedoch solltest du das schon für die Planung kennen. </text:span><text:span text:style-name="T2">Die folgenden Szenarios sind als Audio-Dateien geplant.</text:span></text:p>
      <text:p text:style-name="P1"/>
      <text:p text:style-name="P2">konkrete Formate für die Umsetzung</text:p>
      <text:p text:style-name="P3">Format A: Das gespielte Szenario mit anschließender Analyse (Dauer: ca. 3–5 Minuten)</text:p>
      <text:list text:style-name="L1">
        <text:list-item>
          <text:p text:style-name="P4"><text:span text:style-name="Strong_20_Emphasis"><text:span text:style-name="T3">Teil 1 (Das Szenario):</text:span></text:span><text:span text:style-name="T4"> Zwei Personen spielen eine kurze Szene nach (z. B. ein unangemessener, aufdringlicher Chat oder ein Gespräch im Büro/Verein, bei dem Grenzen überschritten werden).</text:span></text:p>
        </text:list-item>
        <text:list-item>
          <text:p text:style-name="P4"><text:span text:style-name="Strong_20_Emphasis"><text:span text:style-name="T3">Teil 2 (Die Einordnung):</text:span></text:span><text:span text:style-name="T4"> Die Vertrauensperson oder der Schutzbeauftragte der Organisation schaltet sich ein und erklärt sachlich: </text:span><text:span text:style-name="Emphasis"><text:span text:style-name="T4">„Was wir hier gerade gehört haben, war eine nonverbale Grenzverletzung aus Kategorie II unseres Schutzkonzepts. In so einem Fall reagieren wir als Organisation wie folgt...“</text:span></text:span></text:p>
        </text:list-item>
      </text:list>
      <text:p text:style-name="P5">Format B: Der fiktive „Erfahrungsbericht“ (Dauer: ca. 2–3 Minuten)</text:p>
      <text:list text:style-name="L2">
        <text:list-item>
          <text:p text:style-name="P6"><text:span text:style-name="T4">Eine Sprecherin oder ein Sprecher liest ein fiktives, aber realistisches Gedankenprotokoll aus der Ich-Perspektive vor (z. B. </text:span><text:span text:style-name="Emphasis"><text:span text:style-name="T4">„Ich habe mich unwohl gefühlt, als mein Kollege mich ständig gemustert hat...“</text:span></text:span><text:span text:style-name="T4">).</text:span></text:p>
        </text:list-item>
        <text:list-item>
          <text:p text:style-name="P7">Dieses Format eignet sich perfekt, um Betroffenen eine Stimme zu geben und Mut zu machen, sich Hilfe zu suchen.</text:p>
        </text:list-item>
      </text:list>
      <text:p text:style-name="P5">Format C: Das fiktive Beratungsgespräch (Dauer: ca. 5 Minuten)</text:p>
      <text:list text:style-name="L3">
        <text:list-item>
          <text:p text:style-name="P8">Nachgestellt wird der Anruf oder das Erstgespräch einer betroffenen Person (oder einer Zeugin / eines Zeugen) bei der schutzbeauftragten Person der Organisation.</text:p>
        </text:list-item>
        <text:list-item>
          <text:p text:style-name="P9"><text:span text:style-name="Strong_20_Emphasis"><text:span text:style-name="T3">Ziel:</text:span></text:span><text:span text:style-name="T4"> Den Zuhörern die Angst vor dem ersten Schritt zu nehmen. Man hört genau, wie einfühlsam, vertraulich und ohne Vorurteile ein solches Gespräch abläuft.</text:span></text:p>
        </text:list-item>
      </text:list>
      <text:p text:style-name="P10">Wichtige Tipps für die Umsetzung auf der Website</text:p>
      <text:list text:style-name="L4">
        <text:list-item>
          <text:p text:style-name="P11"><text:soft-page-break/><text:span text:style-name="Strong_20_Emphasis"><text:span text:style-name="T3">Triggerwarnung platzieren:</text:span></text:span><text:span text:style-name="T4"> Vor dem Abspielen des Audios muss ein kurzer Text warnen (z. B. </text:span><text:span text:style-name="Emphasis"><text:span text:style-name="T4">„Achtung: Dieses Audio thematisiert verbale sexuelle Belästigung. Wenn Sie sich unwohl fühlen, überspringen Sie diesen Beitrag.“</text:span></text:span><text:span text:style-name="T4">).</text:span></text:p>
        </text:list-item>
        <text:list-item>
          <text:p text:style-name="P11"><text:span text:style-name="Strong_20_Emphasis"><text:span text:style-name="T3">Textliche Alternative bieten:</text:span></text:span><text:span text:style-name="T4"> Stellen Sie das Transkript (den gesprochenen Text) als Text darunter bereit. Das sorgt für Barrierefreiheit und diskretes Nachlesen.</text:span></text:p>
        </text:list-item>
        <text:list-item>
          <text:p text:style-name="P11"><text:span text:style-name="Strong_20_Emphasis"><text:span text:style-name="T3">Direkte Player-Einbindung:</text:span></text:span><text:span text:style-name="T4"> Nutzen Sie einen einfachen Web-Player direkt auf der Unterseite. Die Nutzer sollten die Seite nicht verlassen oder Spotify/Apple Podcasts öffnen müssen, um das Audio zu hören.</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4T22:26:00.089131601</meta:creation-date>
    <dc:date>2026-05-14T22:51:47.649330576</dc:date>
    <meta:editing-duration>PT25M47S</meta:editing-duration>
    <meta:editing-cycles>4</meta:editing-cycles>
    <meta:generator>LibreOffice/26.2.3.2$Linux_X86_64 LibreOffice_project/620$Build-2</meta:generator>
    <meta:document-statistic meta:table-count="0" meta:image-count="0" meta:object-count="0" meta:page-count="2" meta:paragraph-count="15" meta:word-count="432" meta:character-count="3126" meta:non-whitespace-character-count="2718"/>
  </office:meta>
</office:document-meta>
</file>