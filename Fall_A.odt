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2" style:family="paragraph" style:parent-style-name="Standard">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2pt" style:text-underline-style="none" fo:font-weight="normal" officeooo:rsid="000c1757" officeooo:paragraph-rsid="000c1757" style:text-blinking="false" style:font-size-asian="12pt" style:font-weight-asian="normal" style:font-size-complex="12pt" style:font-weight-complex="normal" loext:padding="0cm" loext:border="none"/>
    </style:style>
    <style:style style:name="P3" style:family="paragraph" style:parent-style-name="Standard">
      <style:paragraph-properties fo:margin-left="0cm" fo:margin-right="0cm" fo:margin-top="0cm" fo:margin-bottom="0cm" style:contextual-spacing="false" fo:text-indent="0cm" style:auto-text-indent="false"/>
    </style:style>
    <style:style style:name="P4" style:family="paragraph" style:parent-style-name="Standard">
      <style:paragraph-properties fo:margin-left="0cm" fo:margin-right="0cm" fo:margin-top="0cm" fo:margin-bottom="0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5" style:family="paragraph" style:parent-style-name="Standard">
      <style:paragraph-properties fo:margin-left="0cm" fo:margin-right="0cm" fo:margin-top="0cm" fo:margin-bottom="0cm" style:contextual-spacing="false" fo:text-indent="0cm" style:auto-text-indent="false"/>
      <style:text-properties style:text-line-through-style="none" style:text-line-through-type="none" style:font-name="Google Sans" fo:font-size="12pt" style:text-underline-style="none" fo:font-weight="normal" officeooo:rsid="000ddb1e" officeooo:paragraph-rsid="000ddb1e" style:text-blinking="false" loext:padding="0cm" loext:border="none"/>
    </style:style>
    <style:style style:name="T1" style:family="text">
      <style:text-properties officeooo:rsid="000ddb1e"/>
    </style:style>
    <style:style style:name="T2" style:family="text">
      <style:text-properties style:text-line-through-style="none" style:text-line-through-type="none" style:font-name="Google Sans" fo:font-size="12pt" style:text-underline-style="none" fo:font-weight="bold" style:text-blinking="false" loext:padding="0cm" loext:border="none"/>
    </style:style>
    <style:style style:name="T3" style:family="text">
      <style:text-properties style:text-line-through-style="none" style:text-line-through-type="none" style:font-name="Google Sans" fo:font-size="12pt" style:text-underline-style="none" fo:font-weight="normal" style:text-blinking="false"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laufplan bei Verdacht auf Übergriffe (Außerschulisch/Häuslich)</text:p>
      <text:p text:style-name="P2">Die Situation betrifft eine Berufsschule (Berufliches Gynasiumm, <text:span text:style-name="T1">Fachoberschuler Auszubildende, Fachinformatiker, Elektriker etc. m</text:span>it Schülern zwischen 15 und 25 Jahre </text:p>
      <text:p text:style-name="P3"><text:span text:style-name="Strong_20_Emphasis"><text:span text:style-name="T2">Sprecher 1 (Moderator):</text:span></text:span><text:span text:style-name="T3"> Hallo und willkommen zu unserem heutigen Kurz-Briefing. Es geht um ein extrem wichtiges, aber auch sensibles Thema: Wie reagieren wir als Lehrkräfte und schulisches Personal richtig, wenn wir Anhaltspunkte für Gewalt, Machtmissbrauch oder sexualisierte Gewalt im häuslichen oder außerschulischen Bereich wahrnehmen?</text:span></text:p>
      <text:p text:style-name="P3"><text:span text:style-name="Strong_20_Emphasis"><text:span text:style-name="T2">Sprecher 2 (Expertin):</text:span></text:span><text:span text:style-name="T3"> Hallo. Ja, das ist oft eine psychologische Gratwanderung. Der allererste Schritt ist hier immer die geschärfte Wahrnehmung. Wenn wir Verdachtsmomente oder konkrete Anhaltspunkte bemerken, dürfen wir nicht wegschauen.</text:span></text:p>
      <text:p text:style-name="P3"><text:span text:style-name="Strong_20_Emphasis"><text:span text:style-name="T2">Sprecher 1:</text:span></text:span><text:span text:style-name="T3"> Absolut. Und wenn ich diesen Anfangsverdacht habe – was mache ich als Erstes? Sofort die Schulleitung anrufen?</text:span></text:p>
      <text:p text:style-name="P3"><text:span text:style-name="Strong_20_Emphasis"><text:span text:style-name="T2">Sprecher 2:</text:span></text:span><text:span text:style-name="T3"> Noch nicht ganz. Schritt zwei ist die saubere Dokumentation. Wir müssen unsere eigenen Beobachtungen sachlich aufschreiben. Oder, falls sich uns eine betroffene Person direkt anvertraut, dieses Gespräch genau dokumentieren. Das ist unsere Absicherung und die Basis für alles Weitere.</text:span></text:p>
      <text:p text:style-name="P3"><text:span text:style-name="Strong_20_Emphasis"><text:span text:style-name="T2">Sprecher 1:</text:span></text:span><text:span text:style-name="T3"> Verstehe. Aber oft ist man sich ja unsicher, ob man die Situation richtig einschätzt. Wo finde ich intern Hilfe?</text:span></text:p>
      <text:p text:style-name="P3"><text:span text:style-name="Strong_20_Emphasis"><text:span text:style-name="T2">Sprecher 2:</text:span></text:span><text:span text:style-name="T3"> Dafür gibt es Schritt drei: die vertrauliche Beratung. Man kann und sollte sich an unser schulisches Beratungsteam oder andere interne Anlaufstellen wenden. Das hilft, die eigenen Gedanken zu sortieren, ohne direkt eine große Welle loszutreten.</text:span></text:p>
      <text:p text:style-name="P3"><text:span text:style-name="Strong_20_Emphasis"><text:span text:style-name="T2">Sprecher 1:</text:span></text:span><text:span text:style-name="T3"> Und wie geht es danach weiter, wenn sich der Verdacht erhärtet?</text:span></text:p>
      <text:p text:style-name="P3"><text:span text:style-name="Strong_20_Emphasis"><text:span text:style-name="T2">Sprecher 2:</text:span></text:span><text:span text:style-name="T3"> Dann folgt Schritt vier: Das dokumentierte Gespräch oder der Vorfall wird offiziell an die Abteilungsleitung oder direkt an die Schulleitung gemeldet. Dabei gilt aber immer Schritt fünf: absolute Vertraulichkeit gewähren! Zumindest so lange, wie wir uns nicht im strafbaren Kontext bewegen. Der Schutz der Beteiligten steht obenan.</text:span></text:p>
      <text:p text:style-name="P3"><text:span text:style-name="Strong_20_Emphasis"><text:span text:style-name="T2">Sprecher 1:</text:span></text:span><text:span text:style-name="T3"> Okay, die Schulleitung ist nun im Boot. Was passiert im Hintergrund?</text:span></text:p>
      <text:p text:style-name="P3"><text:span text:style-name="Strong_20_Emphasis"><text:span text:style-name="T2">Sprecher 2:</text:span></text:span><text:span text:style-name="T3"> Jetzt greift Schritt sechs: Eine umfassende Gefährdungseinschätzung. Hier ist das Mehr-Augen-Prinzip zwingend vorgeschrieben. Niemand entscheidet das alleine. Bei Bedarf ziehen wir sofort externe Fachberatungsstellen hinzu. Und wenn akute Gefahr im Verzug ist, regelt Schritt sieben die unverzügliche Einbeziehung von Polizei, Staatsanwaltschaft oder Jugendamt.</text:span></text:p>
      <text:p text:style-name="P4"/>
      <text:p text:style-name="P5"/>
      <text:p text:style-name="P3"><text:soft-page-break/><text:span text:style-name="Strong_20_Emphasis"><text:span text:style-name="T2">Sprecher 1:</text:span></text:span><text:span text:style-name="T3"> Das klingt nach einem sehr strukturierten Sicherheitsnetz. Aber was passiert direkt mit den betroffenen Schülerinnen und Schülern? Die brauchen ja sofort Hilfe.</text:span></text:p>
      <text:p text:style-name="P3"><text:span text:style-name="Strong_20_Emphasis"><text:span text:style-name="T2">Sprecher 2:</text:span></text:span><text:span text:style-name="T3"> Ganz genau, das ist Schritt acht – die konkreten Unterstützungsmaßnahmen. Wir stellen Kontakte zu professionellen Hilfseinrichtungen her. Wir beraten die Jugendlichen sensibel bezüglich einer möglichen Strafanzeige und nehmen – sofern das die Situation nicht verschlimmert – Kontakt zu den Eltern auf.</text:span></text:p>
      <text:p text:style-name="P3"><text:span text:style-name="Strong_20_Emphasis"><text:span text:style-name="T2">Sprecher 1:</text:span></text:span><text:span text:style-name="T3"> Und wie sieht der offizielle Dienstweg nach außen aus? Was muss die Schule formal tun?</text:span></text:p>
      <text:p text:style-name="P3"><text:span text:style-name="Strong_20_Emphasis"><text:span text:style-name="T2">Sprecher 2:</text:span></text:span><text:span text:style-name="T3"> Das regeln die letzten beiden Schritte, neun und zehn. Die Schulleitung meldet den Verdachtsfall je nach Schwere offiziell an das Staatliche Schulamt und das zuständige Polizeikommissariat. Liegt eine Kindeswohlgefährdung vor, geht die Mitteilung an die öffentliche Jugendhilfe. Und wie gesagt: Bei Gefahr in Verzug wird sofort die Polizei oder Staatsanwaltschaft eingeschaltet.</text:span></text:p>
      <text:p text:style-name="P3"><text:span text:style-name="Strong_20_Emphasis"><text:span text:style-name="T2">Sprecher 1:</text:span></text:span><text:span text:style-name="T3"> Ein klarer, strukturierter Leitfaden, der in Krisensituationen Handlungssicherheit gibt. Vielen Dank für diese Übersicht!</text:span></text:p>
      <text:p text:style-name="P3"><text:span text:style-name="Strong_20_Emphasis"><text:span text:style-name="T2">Sprecher 2:</text:span></text:span><text:span text:style-name="T3"> Sehr gerne. Wichtig ist einfach: Hingucken, dokumentieren und den Prozess einhalten.</text:span></text:p>
      <text:p text:style-name="Standard"/>
      <text:p text:style-name="Standard">Übergriffe im außerschulischen und häuslichen Bereich</text:p>
      <text:p text:style-name="Standard"/>
      <text:p text:style-name="Standard"/>
      <text:p text:style-name="Standard">1.</text:p>
      <text:p text:style-name="Standard">Wahrnehmung von Anhaltspunkten/Verdachtsmomenten von Gewalt, Machtmissbrauch oder sexualisierter Gewalt.</text:p>
      <text:p text:style-name="Standard">2.</text:p>
      <text:p text:style-name="Standard">Dokumentation von Beobachtungen bzw. Gespräch mit anvertrauender Person.</text:p>
      <text:p text:style-name="Standard">3.</text:p>
      <text:p text:style-name="Standard">Ggf. vertrauliche Beratung durch schulische Ansprechpersonen (Beratungsteam sowie weitere Anlaufstellen, vgl. Kapitel 4 und 5).</text:p>
      <text:p text:style-name="Standard">4.</text:p>
      <text:p text:style-name="Standard">Dokumentation des Gesprächs und ggf. Meldung des Vorfalls bei der Abteilungsleitung oder Schulleitung.</text:p>
      <text:p text:style-name="Standard">5.</text:p>
      <text:p text:style-name="Standard">Gewährleistung erforderlicher Vertraulichkeit (nicht im strafbaren Kontext).</text:p>
      <text:p text:style-name="Standard">6.</text:p>
      <text:p text:style-name="Standard">Umfassende Gefährdungseinschätzung unter Berücksichtigung des Mehr-Augen-Prinzips; bei Bedarf Rücksprache mit schulischen Ansprechpersonen oder Fachberatungsstelle.</text:p>
      <text:p text:style-name="Standard">7.</text:p>
      <text:p text:style-name="Standard">Ggf. unverzügliche Einbeziehung von Polizei, Staatsanwaltschaft und/oder Jugendamt.</text:p>
      <text:p text:style-name="Standard">8.</text:p>
      <text:p text:style-name="Standard">Unterstützungsmaßnahmen für betroffene Lernende: Bei Bedarf Kontakte zu Hilfseinrichtungen herstellen; ggf. Beratung im Hinblick auf das Stellen einer Strafanzeige; ggf. Kontakt zu Eltern aufnehmen.</text:p>
      <text:p text:style-name="Standard">9.</text:p>
      <text:p text:style-name="Standard">Schulleitung meldet je nach Schwere den Verdachtsfall an das Staatliche Schulamt und das zuständige Kommissariat.</text:p>
      <text:p text:style-name="Standard">10.</text:p>
      <text:p text:style-name="Standard"><text:soft-page-break/>Mitteilung einer Kindeswohlgefährdung an die öffentliche Jugendhilfe oder bei Gefahr in Verzug Einbeziehung von Polizei oder Staatsanwaltschaf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8T20:41:42.599975132</meta:creation-date>
    <meta:print-date>2026-05-18T20:59:49.601067693</meta:print-date>
    <meta:printed-by>PDF-Dateien</meta:printed-by>
    <dc:date>2026-05-18T21:43:31.761340172</dc:date>
    <meta:editing-duration>PT40M41S</meta:editing-duration>
    <meta:editing-cycles>1</meta:editing-cycles>
    <meta:document-statistic meta:table-count="0" meta:image-count="0" meta:object-count="0" meta:page-count="3" meta:paragraph-count="39" meta:word-count="646" meta:character-count="4937" meta:non-whitespace-character-count="4325"/>
    <meta:generator>LibreOffice/26.2.3.2$Linux_X86_64 LibreOffice_project/620$Build-2</meta:generator>
  </office:meta>
</office:document-meta>
</file>