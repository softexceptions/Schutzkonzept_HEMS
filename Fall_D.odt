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2" style:family="paragraph" style:parent-style-name="Standard">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5pt" style:text-underline-style="none" fo:font-weight="bold" style:text-blinking="false" loext:padding="0cm" loext:border="none"/>
    </style:style>
    <style:style style:name="P3" style:family="paragraph" style:parent-style-name="Standard">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 style:family="paragraph" style:parent-style-name="Standard">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font-name="Google Sans"/>
    </style:style>
    <style:style style:name="T1" style:family="text">
      <style:text-properties style:text-line-through-style="none" style:text-line-through-type="none" style:font-name="Google Sans" fo:font-size="12pt" style:text-underline-style="none"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normal" style:text-blinking="false" loext:padding="0cm" loext:border="none"/>
    </style:style>
    <style:style style:name="T3" style:family="text">
      <style:text-properties style:text-line-through-style="none" style:text-line-through-type="none" style:font-name="Google Sans" fo:font-size="12pt" style:text-underline-style="none" fo:font-weight="normal" officeooo:rsid="001529a1" style:text-blinking="false" loext:padding="0cm" loext:border="none"/>
    </style:style>
    <style:style style:name="T4" style:family="text">
      <style:text-properties fo:font-weight="bold"/>
    </style:style>
    <style:style style:name="T5" style:family="text">
      <style:text-properties style:text-line-through-style="none" style:text-line-through-type="none" fo:font-size="12pt" style:text-underline-style="none" fo:font-weight="bold" style:text-blinking="false" loext:padding="0cm" loext:border="none"/>
    </style:style>
    <style:style style:name="T6" style:family="text">
      <style:text-properties style:text-line-through-style="none" style:text-line-through-type="none" fo:font-size="12pt" style:text-underline-style="none" fo:font-weight="normal" style:text-blinking="false" loext:padding="0cm" loext:border="none"/>
    </style:style>
    <style:style style:name="T7" style:family="text">
      <style:text-properties style:text-line-through-style="none" style:text-line-through-type="none" fo:font-size="12pt" style:text-underline-style="none" fo:font-weight="normal" officeooo:rsid="00168b4f" style:text-blinking="false"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Übergriffe auf Beschäftigte der Schule</text:p>
      <text:p text:style-name="Standard">Die Situation betrifft eine Berufsschule (Berufliches Gynasiumm, Fachoberschüler,</text:p>
      <text:p text:style-name="Standard">Berufsfachschule Auszubildende, Fachinformatiker, Elektriker, mit Schülern zwischen</text:p>
      <text:p text:style-name="Standard">15 und 25</text:p>
      <text:p text:style-name="Standard"/>
      <text:p text:style-name="Standard">Hier ist ein maßgeschneidertes, hochgradig realistisches Szenario für diesen spezifischen Fall. An einer Berufsschule mit erwachsenen und fast erwachsenen Schülern (wie Fachinformatikern oder Elektrikern) sind Übergriffe auf das Personal leider meistens Grenzverletzungen durch verbale Aggression, massives Cyberstalking oder handfeste Bedrohungen rund um Noten und Abschlüsse.Dieses Szenario und das dazugehörige Skript beleuchten die emotionale Belastung für Lehrkräfte und zeigen, wie der 8-Schritte-Plan der betroffenen Person den Rücken stärkt.</text:p>
      <text:p text:style-name="Standard"/>
      <text:list text:style-name="L1">
        <text:list-item>
          <text:p text:style-name="P1"><text:span text:style-name="Strong_20_Emphasis"><text:span text:style-name="T1">Die Beteiligten:</text:span></text:span></text:p>
          <text:list>
            <text:list-item>
              <text:p text:style-name="P1"><text:span text:style-name="Strong_20_Emphasis"><text:span text:style-name="T1">Frau S. (28 Jahre):</text:span></text:span><text:span text:style-name="T2"> Junge Lehrerin für Wirtschaft und Politik a</text:span><text:span text:style-name="T3">n</text:span><text:span text:style-name="T2"> </text:span><text:span text:style-name="T3">der Fachoberschule</text:span><text:span text:style-name="T2">.</text:span></text:p>
            </text:list-item>
            <text:list-item>
              <text:p text:style-name="P1"><text:span text:style-name="Strong_20_Emphasis"><text:span text:style-name="T1">Kevin (21 Jahre):</text:span></text:span><text:span text:style-name="T2"> Schüler der Fachoberschule, bereits volljährig, bekannt für impulsives Verhalten.</text:span></text:p>
            </text:list-item>
          </text:list>
        </text:list-item>
        <text:list-item>
          <text:p text:style-name="P1"><text:span text:style-name="Strong_20_Emphasis"><text:span text:style-name="T1">Der Vorfall:</text:span></text:span><text:span text:style-name="T2"> Kevin droht das Fachabitur wegen mangelhafter Leistungen im Fach von Frau S. zu verfehlen. Nach einer Lehrwerkstatt-Stunde passt er sie auf dem Parkplatz ab, baut sich bedrohlich vor ihr auf und sagt: „Wenn ich wegen Ihnen durchfalle, sorgt mein Anwalt dafür, dass Sie hier nie wieder unterrichten.“ In den folgenden Tagen eskaliert es: Frau S. erhält anonyme, sexuelle und bedrohliche Nachrichten auf ihrem Dienst-Instagram-Account, die eindeutig Insiderwissen aus Kevins Klasse enthalten. Frau S. fühlt sich in ihrer Sicherheit massiv bedroht und geht ungern zur Schule.</text:span></text:p>
        </text:list-item>
      </text:list>
      <text:p text:style-name="P2">Das NotebookLM-Audio-Skript (Passend zu den 8 Schritten)</text:p>
      <text:p text:style-name="P3"><text:span text:style-name="Strong_20_Emphasis"><text:span text:style-name="T1">Sprecher 1 (Moderator):</text:span></text:span><text:span text:style-name="T2"> Willkommen zu unserer heutigen Fallanalyse. Wir sprechen über ein Szenario, das im Schulalltag oft tabuisiert wird: Übergriffe auf Beschäftigte der Schule selbst. An einer Berufsschule mit Schülern im Alter von bis zu 25 Jahren kann das von massiver Einschüchterung bis hin zu Stalking reichen. Schauen wir uns den Fall von der jungen Lehrerin Frau S. und dem Schüler Kevin an.</text:span></text:p>
      <text:p text:style-name="P3"><text:span text:style-name="Strong_20_Emphasis"><text:span text:style-name="T1">Sprecher 2 (Expertin):</text:span></text:span><text:span text:style-name="T2"> Ja, ein sehr ernster Fall, der zeigt, dass auch Lehrkräfte maximalen Schutz brauchen. Alles beginnt mit </text:span><text:span text:style-name="Strong_20_Emphasis"><text:span text:style-name="T1">Schritt 1</text:span></text:span><text:span text:style-name="T2">: Frau S. frisst die Angst nicht in sich hinein, sondern wendet sich vertrauensvoll an ihre Abteilungsleitung. Von dort geht es sofort weiter in </text:span><text:span text:style-name="Strong_20_Emphasis"><text:span text:style-name="T1">Schritt 2</text:span></text:span><text:span text:style-name="T2"> – der direkten Rücksprache mit der Schulleitung. Hier findet ein sensibles, gemeinsames Gespräch statt, um das weitere Vorgehen abzustimmen und der Kollegin sofort den Rücken zu stärken.</text:span></text:p>
      <text:p text:style-name="P3"><text:span text:style-name="Strong_20_Emphasis"><text:span text:style-name="T1">Sprecher 1:</text:span></text:span><text:span text:style-name="T2"> Als Angestellte oder Beamtin hat man an der Schule ja auch eine starke Arbeitnehmervertretung. Kommt die hier ins Spiel?</text:span></text:p>
      <text:p text:style-name="P4"/>
      <text:p text:style-name="P5"><text:span text:style-name="Strong_20_Emphasis"><text:span text:style-name="T4">Sprecher 2:</text:span></text:span> Absolut, das regelt <text:span text:style-name="Strong_20_Emphasis"><text:span text:style-name="T4">Schritt 3</text:span></text:span>. Frau S. entscheidet sich in dem Gespräch dazu, den Personalrat hinzuzuziehen. Das ist enorm wichtig, damit die Betroffene eine zusätzliche, unabhängige Unterstützung an ihrer Seite hat, die ihre Rechte im Blick behält.</text:p>
      <text:p text:style-name="P3"><text:soft-page-break/><text:span text:style-name="Strong_20_Emphasis"><text:span text:style-name="T1">Sprecher 1:</text:span></text:span><text:span text:style-name="T2"> Und wie reagiert die Schulleitung gegenüber dem Schüler Kevin? Der kann ja nicht einfach so weitermachen.</text:span></text:p>
      <text:p text:style-name="P3"><text:span text:style-name="Strong_20_Emphasis"><text:span text:style-name="T1">Sprecher 2:</text:span></text:span><text:span text:style-name="T2"> Genau. In den </text:span><text:span text:style-name="Strong_20_Emphasis"><text:span text:style-name="T1">Schritten 4 und 5</text:span></text:span><text:span text:style-name="T2"> übernimmt die Schulleitung die Initiative. Sie zitiert Kevin zu einem offiziellen Gespräch. Hier wird er knallhart mit dem Verdacht und den Vorwürfen konfrontiert. Die Schulleitung macht sofort klar, dass dies kein Kavaliersdelikt ist, und leitet umgehend schulrechtliche Konsequenzen ein – in diesem Fall ein temporäres Schulverbot und den Ausschluss vom Unterricht.</text:span></text:p>
      <text:p text:style-name="P3"><text:span text:style-name="Strong_20_Emphasis"><text:span text:style-name="T1">Sprecher 1:</text:span></text:span><text:span text:style-name="T2"> Kevin ist 21 Jahre alt, also voll strafmündig. Muss die Schule ihn in so einem Gespräch auf seine Rechte hinweisen?</text:span></text:p>
      <text:p text:style-name="P3"><text:span text:style-name="Strong_20_Emphasis"><text:span text:style-name="T1">Sprecher 2:</text:span></text:span><text:span text:style-name="T2"> Ja, das ist </text:span><text:span text:style-name="Strong_20_Emphasis"><text:span text:style-name="T1">Schritt 6</text:span></text:span><text:span text:style-name="T2">. Da es sich um schwerwiegende Vorwürfe handelt, die auch strafrechtlich relevant sein können (wie Bedrohung und Nachstellung), wird Kevin explizit darauf hingewiesen, dass er einen Rechtsbeistand hinzuziehen kann. Das sorgt für juristische Sauberkeit im Verfahren.</text:span></text:p>
      <text:p text:style-name="P3"><text:span text:style-name="Strong_20_Emphasis"><text:span text:style-name="T1">Sprecher 1:</text:span></text:span><text:span text:style-name="T2"> Für Frau S. ist es wahrscheinlich psychologisch unzumutbar, Kevin im Schulflur zu begegnen. Wie wird sie geschützt?</text:span></text:p>
      <text:p text:style-name="P3"><text:span text:style-name="Strong_20_Emphasis"><text:span text:style-name="T1">Sprecher 2:</text:span></text:span><text:span text:style-name="T2"> Das ist der Kern von </text:span><text:span text:style-name="Strong_20_Emphasis"><text:span text:style-name="T1">Schritt 7 – die Täter-Opfer-Trennung</text:span></text:span><text:span text:style-name="T2">. Durch das sofortige Betretungsverbot für Kevin wird sichergestellt, dass Frau S. ihren Dienst wieder angstfrei antreten kann. Kevin darf das Schulgelände bis zur endgültigen Klärung durch die Konferenz nicht mehr betreten.</text:span></text:p>
      <text:p text:style-name="P5"><text:span text:style-name="Strong_20_Emphasis"><text:span text:style-name="T4">Sprecher 1:</text:span></text:span> Und wie wird die psychische Belastung von Frau S. aufgefangen?</text:p>
      <text:p text:style-name="P3"><text:span text:style-name="Strong_20_Emphasis"><text:span text:style-name="T1">Sprecher 2:</text:span></text:span><text:span text:style-name="T2"> Das regelt der finale </text:span><text:span text:style-name="Strong_20_Emphasis"><text:span text:style-name="T1">Schritt 8</text:span></text:span><text:span text:style-name="T2">. Die Schulleitung leitet sofort Hilfsmöglichkeiten und Unterstützungsmaßnahmen ein. Das reicht von psychologischer Akuthilfe über die Begleitung durch den schulpsychologischen Dienst bis hin zur rechtlichen Unterstützung, falls Frau S. – mit Rückhalt der Schulleitung – eine Strafanzeige wegen Bedrohung und Stalking bei der Polizei erstatten möchte.</text:span></text:p>
      <text:p text:style-name="P3"><text:span text:style-name="Strong_20_Emphasis"><text:span text:style-name="T1">Sprecher 1:</text:span></text:span><text:span text:style-name="T2"> Ein starkes Signal an das gesamte Kollegium: Die Schule schützt ihre Beschäftigten konsequent und lässt niemanden mit Übergriffen allein. Vielen Dank für diese Einblicke.</text:span></text:p>
      <text:p text:style-name="P2">Tipps für Ihr NotebookLM:</text:p>
      <text:list text:style-name="L2">
        <text:list-item>
          <text:p text:style-name="P6"><text:span text:style-name="Strong_20_Emphasis"><text:span text:style-name="T5">Regieanweisung für das Audio (Customize):</text:span></text:span><text:span text:style-name="T6"> Geben Sie NotebookLM mit auf den Weg: </text:span><text:span text:style-name="Emphasis"><text:span text:style-name="T6">„Erstelle ein energisches, aber unterstützendes Audio. Betone, dass Lehrkräfte keine Gewalt oder Bedrohungen erdulden müssen und die Schulleitung hier sofort eine klare Schutzfunktion für ihr Personal übernimmt.“</text:span></text:span></text:p>
        </text:list-item>
        <text:list-item>
          <text:p text:style-name="P6"><text:span text:style-name="Strong_20_Emphasis"><text:span text:style-name="T5">Besonderheit dieses Falls:</text:span></text:span><text:span text:style-name="T6"> Dieses Skript unterscheidet sich stark von den vorherigen, weil die Lehrkraft hier das </text:span><text:span text:style-name="Emphasis"><text:span text:style-name="T6">Opfer</text:span></text:span><text:span text:style-name="T6"> ist. Das zeigt im NotebookLM-Gesamtzusammenhang perfekt, dass der </text:span><text:span text:style-name="T7">Jugend</text:span><text:span text:style-name="T6">schutz- und Interventionsplan alle Akteure im System Schule schützt.</text:span></text:p>
        </text:list-item>
      </text:list>
      <text:p text:style-name="Horizontal_20_Line"/>
      <text:p text:style-name="Standard"/>
      <text:p text:style-name="Standard"/>
      <text:p text:style-name="Standard">Übergriffe auf Beschäftigte der Schule</text:p>
      <text:p text:style-name="Standard"/>
      <text:p text:style-name="Standard"><text:soft-page-break/>1. Betroffene/r oder Vertrauensperson informiert die Abteilungsleitung/Schulleitung.</text:p>
      <text:p text:style-name="Standard">2. Rücksprache mit der Schulleitung. Gemeinsames Gespräch mit Betroffenen über weiteres Vorgehen.</text:p>
      <text:p text:style-name="Standard">3. Evtl. Personalrat hinzuziehen.</text:p>
      <text:p text:style-name="Standard">4. Evtl. führt die Schulleitung ein Gespräch mit der beschuldigten Person.</text:p>
      <text:p text:style-name="Standard">5. Konfrontation mit dem Verdacht; ggf. dienst- und schulrechtliche Konsequenzen.</text:p>
      <text:p text:style-name="Standard">6. Auf Möglichkeit der Hinzuziehung eines Rechtsbeistandes hinweisen.</text:p>
      <text:p text:style-name="Standard">7. Täter-Opfer-Trennung.</text:p>
      <text:p text:style-name="Standard">8. Hilfsmöglichkeiten und Unterstützungsmaßnahmen einlei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9T21:03:05.103470089</meta:creation-date>
    <dc:date>2026-05-19T21:14:57.614542241</dc:date>
    <meta:editing-duration>PT1M13S</meta:editing-duration>
    <meta:editing-cycles>1</meta:editing-cycles>
    <meta:document-statistic meta:table-count="0" meta:image-count="0" meta:object-count="0" meta:page-count="3" meta:paragraph-count="35" meta:word-count="844" meta:character-count="6039" meta:non-whitespace-character-count="5231"/>
    <meta:generator>LibreOffice/26.2.3.2$Linux_X86_64 LibreOffice_project/620$Build-2</meta:generator>
  </office:meta>
</office:document-meta>
</file>