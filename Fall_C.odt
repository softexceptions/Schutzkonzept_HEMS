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normal" style:text-blinking="false" style:font-size-asian="12pt" style:font-weight-asian="normal" style:font-size-complex="12pt" style:font-weight-complex="normal" loext:padding="0cm" loext:border="none"/>
    </style:style>
    <style:style style:name="P3" style:family="paragraph" style:parent-style-name="Standard">
      <style:paragraph-properties fo:margin-left="0cm" fo:margin-right="0cm" fo:margin-top="0cm" fo:margin-bottom="0cm" style:contextual-spacing="false" fo:text-indent="0cm" style:auto-text-indent="false"/>
    </style:style>
    <style:style style:name="P4" style:family="paragraph" style:parent-style-name="Standard">
      <style:paragraph-properties fo:margin-left="0cm" fo:margin-right="0cm" fo:margin-top="0cm" fo:margin-bottom="0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T1" style:family="text">
      <style:text-properties style:text-line-through-style="none" style:text-line-through-type="none" style:font-name="Google Sans" fo:font-size="12pt" style:text-underline-style="none"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gepasster Quellen-Text für NotebookLM (Fokus: Lehrkräfte &amp; Kollegen-Dilemma)</text:p>
      <text:p text:style-name="P2">Die Situation betrifft eine Berufsschule (Berufliches Gynasiumm, Fachoberschüler, Berufsfachschule Auszubildende, Fachinformatiker, Elektriker, mit Schülern zwischen 15 und 25</text:p>
      <text:p text:style-name="P3"><text:span text:style-name="Strong_20_Emphasis"><text:span text:style-name="T1">Sprecher 1 (Moderator):</text:span></text:span><text:span text:style-name="T2"> Wir müssen jetzt über den Elefanten im Raum sprechen. Bei Vorwürfen gegen das eigene Schulpersonal geht es ja nicht um Fremde. Es geht um Kollegen. Menschen, mit denen man täglich Kaffee trinkt, Klausuren abspricht, vielleicht sogar befreundet ist. Das macht das Ganze extrem subtil und verdammt schwer. Nehmen wir unseren Fall von Lukas und dem Fachlehrer Herrn M. Eine andere Lehrkraft bemerkt, dass etwas nicht stimmt. Wie geht man damit um?</text:span></text:p>
      <text:p text:style-name="P3"><text:span text:style-name="Strong_20_Emphasis"><text:span text:style-name="T1">Sprecher 2 (Expertin):</text:span></text:span><text:span text:style-name="T2"> Genau das ist die größte psychologische Hürde im Kinderschutz. Wenn eine Lehrkraft im Alltag bemerkt, dass ein Schüler plötzlich im Unterricht eines Kollegen extrem nervös wirkt oder die Leistungen einbrechen, kommen sofort Zweifel auf: </text:span><text:span text:style-name="Emphasis"><text:span text:style-name="T2">„Habe ich das richtig gesehen?“, „Ich will dem Kollegen doch nicht das Leben zerstören“, „Nachher gilt man als Nestbeschmutzer.“</text:span></text:span><text:span text:style-name="T2"> Das ist völlig menschlich. Aber genau deshalb ist der Ablaufplan so gebaut. Er schützt beide Seiten.</text:span></text:p>
      <text:p text:style-name="P3"><text:span text:style-name="Strong_20_Emphasis"><text:span text:style-name="T1">Sprecher 1:</text:span></text:span><text:span text:style-name="T2"> Inwiefern schützt er beide Seiten? Wenn eine Lehrkraft den Verdacht gegen einen Kollegen meldet, steht dieser doch sofort am Pranger.</text:span></text:p>
      <text:p text:style-name="P3"><text:span text:style-name="Strong_20_Emphasis"><text:span text:style-name="T1">Sprecher 2:</text:span></text:span><text:span text:style-name="T2"> Eben nicht, wenn man sich strikt an die Schritte hält! </text:span><text:span text:style-name="Strong_20_Emphasis"><text:span text:style-name="T1">Schritt 2</text:span></text:span><text:span text:style-name="T2"> sagt ganz klar: Die Lehrkraft, die den Verdacht wahrnimmt oder mit dem Schüler spricht, dokumentiert nur die reinen Fakten – ohne eigene Bewertung. In </text:span><text:span text:style-name="Strong_20_Emphasis"><text:span text:style-name="T1">Schritt 3</text:span></text:span><text:span text:style-name="T2"> sucht diese Lehrkraft eine vertrauliche Beratung beim schulischen Beratungsteam. Das bedeutet: Keine Gerüchte im Lehrerzimmer, kein Tuscheln. Alles bleibt komplett anonymisiert, solange es ein vager Verdacht ist.</text:span></text:p>
      <text:p text:style-name="P3"><text:span text:style-name="Strong_20_Emphasis"><text:span text:style-name="T1">Sprecher 1:</text:span></text:span><text:span text:style-name="T2"> Okay, aber in </text:span><text:span text:style-name="Strong_20_Emphasis"><text:span text:style-name="T1">Schritt 4</text:span></text:span><text:span text:style-name="T2"> informiert das Beratungsteam gemeinsam mit der Lehrkraft die Schulleitung. Und in </text:span><text:span text:style-name="Strong_20_Emphasis"><text:span text:style-name="T1">Schritt 5</text:span></text:span><text:span text:style-name="T2"> geht es direkt an das Staatliche Schulamt. Ab da rollt doch die Lawine. Was, wenn die Lehrkraft sich geirrt hat und der Kollege unschuldig ist?</text:span></text:p>
      <text:p text:style-name="P3"><text:span text:style-name="Strong_20_Emphasis"><text:span text:style-name="T1">Sprecher 2:</text:span></text:span><text:span text:style-name="T2"> Das Schulamt und die Schulleitung handeln hier rein professionell. Die Meldung in Schritt 5 ist kein Schuldspruch, sondern eine gesetzliche Pflicht. In </text:span><text:span text:style-name="Strong_20_Emphasis"><text:span text:style-name="T1">Schritt 8</text:span></text:span><text:span text:style-name="T2"> führt die Schulaufsicht das offizielle Dienstgespräch mit dem beschuldigten Kollegen. Wenn sich der Verdacht als haltlos erweist, schützt dieses saubere, offizielle Verfahren den Kollegen sogar vor bleibenden Gerüchten, weil es sauber aufgeklärt und dokumentiert wurde.</text:span></text:p>
      <text:p text:style-name="P3"><text:span text:style-name="Strong_20_Emphasis"><text:span text:style-name="T1">Sprecher 1:</text:span></text:span><text:span text:style-name="T2"> Und was ist, wenn der Verdacht sich erhärtet? Für das Kollegium ist das ja eine emotionale Zerreißprobe.</text:span></text:p>
      <text:p text:style-name="P3"><text:span text:style-name="Strong_20_Emphasis"><text:span text:style-name="T1">Sprecher 2:</text:span></text:span><text:span text:style-name="T2"> Absolut. Deshalb regelt </text:span><text:span text:style-name="Strong_20_Emphasis"><text:span text:style-name="T1">Schritt 9</text:span></text:span><text:span text:style-name="T2">, dass die Schulleitung die Schulgemeinde sachlich informiert. Es geht um Transparenz, aber auch um Fürsorge </text:span><text:soft-page-break/><text:span text:style-name="T2">für alle Lehrkräfte. Klar muss sein: Der Schutz der Lernenden in </text:span><text:span text:style-name="Strong_20_Emphasis"><text:span text:style-name="T1">Schritt 10</text:span></text:span><text:span text:style-name="T2"> steht immer über der kollegialen Loyalität. Berufsschüler sind uns anvertraut. Ein Weggucken aus falscher Höflichkeit schadet am Ende dem Opfer, der Schule und dem Ruf des gesamten Kollegiums.</text:span></text:p>
      <text:p text:style-name="P3"><text:span text:style-name="Strong_20_Emphasis"><text:span text:style-name="T1">Sprecher 1:</text:span></text:span><text:span text:style-name="T2"> Das heißt zusammenfassend: Der Leitfaden nimmt die persönliche Emotion raus und gibt den Lehrkräften Sicherheit.</text:span></text:p>
      <text:p text:style-name="P3"><text:span text:style-name="Strong_20_Emphasis"><text:span text:style-name="T1">Sprecher 2:</text:span></text:span><text:span text:style-name="T2"> Exakt. Die einzelne Lehrkraft muss nicht Ermittler oder Richter spielen. Sie muss nur die Beobachtung an das System übergeben und wird dadurch maximal entlastet.</text:span></text:p>
      <text:p text:style-name="P4"/>
      <text:p text:style-name="P4">Übergriffe durch Schulpersonal im schulischen Bereich</text:p>
      <text:p text:style-name="P4"/>
      <text:p text:style-name="P4"/>
      <text:p text:style-name="P4">1.</text:p>
      <text:p text:style-name="P4">Wahrnehmung von Anhaltspunkten/Verdachtsmomenten.</text:p>
      <text:p text:style-name="P4">2.</text:p>
      <text:p text:style-name="P4">Dokumentation von Beobachtungen bzw. Gespräch mit anvertrauender Person.</text:p>
      <text:p text:style-name="P4">3.</text:p>
      <text:p text:style-name="P4">Ggf. vertrauliche Beratung durch schulische Ansprechpersonen.</text:p>
      <text:p text:style-name="P4">4.</text:p>
      <text:p text:style-name="P4">Dokumentation des Gesprächs. Ansprechpartner/innen informieren die Schulleitung.</text:p>
      <text:p text:style-name="P4">5.</text:p>
      <text:p text:style-name="P4">Schulleitung meldet Verdachtsfall an Staatliches Schulamt; ggf. Einbeziehung der Polizei.</text:p>
      <text:p text:style-name="P4">6.</text:p>
      <text:p text:style-name="P4">Schulleitung klärt weitere Handlungsschritte mit der betroffenen Person und ggf. der gesetzlichen Vertretung ab.</text:p>
      <text:p text:style-name="P4">7.</text:p>
      <text:p text:style-name="P4">Abschätzung einer Kindeswohlgefährdung, ggf. Beratung durch eine erfahrene Fachkraft.</text:p>
      <text:p text:style-name="P4">8.</text:p>
      <text:p text:style-name="P4">Gespräch mit beschuldigter Person durch die Schulaufsicht, ggf. unter Einbeziehung der Schulleitung.</text:p>
      <text:p text:style-name="P4">9.</text:p>
      <text:p text:style-name="P4">Schulleitung informiert Schulgemeinde.</text:p>
      <text:p text:style-name="P4">10.</text:p>
      <text:p text:style-name="P4">Unterstützungs- und Schutzmaßnahmen für betroffene Lernende sowie Maßnahmen gegenüber der tatverdächtigen Person.</text:p>
      <text:p text:style-name="P4">11.</text:p>
      <text:p text:style-name="P4">Ggf. Beratung im Hinblick auf das Stellen einer Strafanzeige. Weiteres Vorgehen in Absprache mit Schulaufsicht und der Polizei.</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8T22:42:31.629823962</meta:creation-date>
    <meta:print-date>2026-05-18T22:44:52.686534298</meta:print-date>
    <meta:printed-by>PDF-Dateien</meta:printed-by>
    <dc:date>2026-05-18T22:46:54.274469124</dc:date>
    <meta:editing-duration>PT2M1S</meta:editing-duration>
    <meta:editing-cycles>1</meta:editing-cycles>
    <meta:document-statistic meta:table-count="0" meta:image-count="0" meta:object-count="0" meta:page-count="2" meta:paragraph-count="35" meta:word-count="610" meta:character-count="4357" meta:non-whitespace-character-count="3781"/>
    <meta:generator>LibreOffice/26.2.3.2$Linux_X86_64 LibreOffice_project/620$Build-2</meta:generator>
  </office:meta>
</office:document-meta>
</file>