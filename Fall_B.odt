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3"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T1" style:family="text">
      <style:text-properties style:text-line-through-style="none" style:text-line-through-type="none" style:font-name="Google Sans" fo:font-size="12pt" style:text-underline-style="none" fo:font-weight="normal" style:text-blinking="false" style:font-weight-asian="normal" style:font-weight-complex="normal" loext:padding="0cm" loext:border="none"/>
    </style:style>
    <style:style style:name="T2" style:family="text">
      <style:text-properties style:text-line-through-style="none" style:text-line-through-type="none" style:font-name="Google Sans" fo:font-size="12pt" style:text-underline-style="none" fo:font-weight="normal" officeooo:rsid="0001b066" style:text-blinking="false" style:font-weight-asian="normal" style:font-weight-complex="normal" loext:padding="0cm" loext:border="none"/>
    </style:style>
    <style:style style:name="T3" style:family="text">
      <style:text-properties style:text-line-through-style="none" style:text-line-through-type="none" style:font-name="Google Sans" fo:font-size="12pt" style:text-underline-style="none" fo:font-weight="bold" style:text-blinking="false" loext:padding="0cm" loext:border="none"/>
    </style:style>
    <style:style style:name="T4" style:family="text">
      <style:text-properties style:text-line-through-style="none" style:text-line-through-type="none" style:font-name="Google Sans" fo:font-size="12pt" style:text-underline-style="none" fo:font-weight="normal" style:text-blinking="false"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ie Situation betrifft eine Berufsschule (Berufliches Gynasiumm, Fachobersch</text:span></text:span><text:span text:style-name="Strong_20_Emphasis"><text:span text:style-name="T2">ü</text:span></text:span><text:span text:style-name="Strong_20_Emphasis"><text:span text:style-name="T1">ler, Berufsfachschule Auszubildende, Fachinformatiker, Elektriker, mit Schülern zwischen 15 und 25</text:span></text:span></text:p>
      <text:p text:style-name="P1"><text:span text:style-name="Strong_20_Emphasis"><text:span text:style-name="T1">Jahre</text:span></text:span></text:p>
      <text:p text:style-name="P1"><text:span text:style-name="Strong_20_Emphasis"><text:span text:style-name="T3">Titel:</text:span></text:span><text:span text:style-name="T4"> Fall B – Verdacht auf fortgesetztes Cyberbullying und erpresserische Gewalt unter Lernenden der Jahrgangsstufe 9.</text:span></text:p>
      <text:list text:style-name="L1">
        <text:list-item>
          <text:p text:style-name="P2"><text:span text:style-name="Strong_20_Emphasis"><text:span text:style-name="T3">Der Vorfall:</text:span></text:span><text:span text:style-name="T4"> Die 15-jährige Schülerin Lena vertraut sich nach dem Unterricht ihrer Klassenlehrerin an. Sie berichtet unter Tränen, dass sie seit Wochen von einer Gruppe älterer Mitschüler (angeführt vom 16-jährigen Jonas) auf dem Schulhof bedroht und in einer privaten Chatgruppe massiv sexuell beleidigt wird. Zudem wurde sie gezwungen, Geld zu übergeben, damit keine manipulierten (Deepfake-)Bilder von ihr verbreitet werden.</text:span></text:p>
        </text:list-item>
      </text:list>
      <text:p text:style-name="Horizontal_20_Line"/>
      <text:p text:style-name="P3">Das NotebookLM-Audio-Skript (Basierend auf dem Szenario)</text:p>
      <text:p text:style-name="P4"><text:span text:style-name="Strong_20_Emphasis"><text:span text:style-name="T3">Sprecher 1 (Moderator):</text:span></text:span><text:span text:style-name="T4"> Willkommen zurück. Wir schauen uns heute den „Fall B“ an. Ein Szenario, das leider immer häufiger vorkommt: Übergriffe von Lernenden untereinander, direkt im schulischen Umfeld. Konkret geht es um einen Fall von massivem Cyberbullying und Erpressung in einer 9. Klasse.</text:span></text:p>
      <text:p text:style-name="P4"><text:span text:style-name="Strong_20_Emphasis"><text:span text:style-name="T3">Sprecher 2 (Expertin):</text:span></text:span><text:span text:style-name="T4"> Ja, ein sehr sensibler Fall, der den 11-Punkte-Ablaufplan perfekt veranschaulicht. Alles beginnt mit </text:span><text:span text:style-name="Strong_20_Emphasis"><text:span text:style-name="T3">Schritt 1</text:span></text:span><text:span text:style-name="T4">, der Wahrnehmung. Die Klassenlehrerin bemerkt, dass Lena sich sozial zurückzieht und die Noten absacken. Schließlich vertraut sich Lena ihr an.</text:span></text:p>
      <text:p text:style-name="P4"><text:span text:style-name="Strong_20_Emphasis"><text:span text:style-name="T3">Sprecher 1:</text:span></text:span><text:span text:style-name="T4"> Und anstatt sofort die Klasse zu konfrontieren, greift direkt </text:span><text:span text:style-name="Strong_20_Emphasis"><text:span text:style-name="T3">Schritt 2</text:span></text:span><text:span text:style-name="T4">, richtig?</text:span></text:p>
      <text:p text:style-name="P4"><text:span text:style-name="Strong_20_Emphasis"><text:span text:style-name="T3">Sprecher 2:</text:span></text:span><text:span text:style-name="T4"> Ganz genau. Die Lehrkraft bewahrt die Ruhe und fertigt sofort ein detailliertes, sachliches Gedächtnisprotokoll des Gesprächs an. Nichts wird ungeprüft weitererzählt. Um sich abzusichern, sucht sie in </text:span><text:span text:style-name="Strong_20_Emphasis"><text:span text:style-name="T3">Schritt 3</text:span></text:span><text:span text:style-name="T4"> eine vertrauliche Beratung beim schulischen Beratungsteam.</text:span></text:p>
      <text:p text:style-name="P4"><text:span text:style-name="Strong_20_Emphasis"><text:span text:style-name="T3">Sprecher 1:</text:span></text:span><text:span text:style-name="T4"> Ab wann wird die Schulleitung aktiv?</text:span></text:p>
      <text:p text:style-name="P4"><text:span text:style-name="Strong_20_Emphasis"><text:span text:style-name="T3">Sprecher 2:</text:span></text:span><text:span text:style-name="T4"> Das passiert in </text:span><text:span text:style-name="Strong_20_Emphasis"><text:span text:style-name="T3">Schritt 4</text:span></text:span><text:span text:style-name="T4">. Das Protokoll geht an die Schulleitung. Unverzüglich wird eine vertrauliche Konferenz einberufen – bestehend aus der Klassenleitung, der Vertrauensperson, der Abteilungsleitung und der Schulleitung selbst. Hierbei gilt nach </text:span><text:span text:style-name="Strong_20_Emphasis"><text:span text:style-name="T3">Schritt 5</text:span></text:span><text:span text:style-name="T4"> weiterhin die strikte Pflicht zur Vertraulichkeit, um keine Vorverurteilungen zu erzeugen.</text:span></text:p>
      <text:p text:style-name="P4"><text:soft-page-break/><text:span text:style-name="Strong_20_Emphasis"><text:span text:style-name="T3">Sprecher 1:</text:span></text:span><text:span text:style-name="T4"> Im schulischen Bereich müssen wir ja mit beiden Seiten arbeiten – dem Opfer und den Tätern. Wie sieht das in der Praxis aus?</text:span></text:p>
      <text:p text:style-name="P4"><text:span text:style-name="Strong_20_Emphasis"><text:span text:style-name="T3">Sprecher 2:</text:span></text:span><text:span text:style-name="T4"> Das regeln die </text:span><text:span text:style-name="Strong_20_Emphasis"><text:span text:style-name="T3">Schritte 6 und 7</text:span></text:span><text:span text:style-name="T4">. Es werden getrennte, strukturierte Gespräche mit allen Beteiligten geführt – also mit Lena und auch mit Jonas. Da beide minderjährig sind, werden die Erziehungsberechtigten verpflichtend hinzugezogen. In diesen Gesprächen geht es um Sanktionen, pädagogische Maßnahmen und Ordnungsmaßnahmen. Ganz wichtig: Jonas und Lena werden ab sofort im Schulalltag konsequent getrennt, um Lena zu schützen.</text:span></text:p>
      <text:p text:style-name="P4"><text:span text:style-name="Strong_20_Emphasis"><text:span text:style-name="T3">Sprecher 1:</text:span></text:span><text:span text:style-name="T4"> Lena braucht jetzt sicherlich auch psychologischen Rückhalt.</text:span></text:p>
      <text:p text:style-name="P4"><text:span text:style-name="Strong_20_Emphasis"><text:span text:style-name="T3">Sprecher 2:</text:span></text:span><text:span text:style-name="T4"> Absolut, das ist </text:span><text:span text:style-name="Strong_20_Emphasis"><text:span text:style-name="T3">Schritt 9</text:span></text:span><text:span text:style-name="T4">. Die Schule vermittelt Lena und ihren Eltern den Kontakt zu einer externen Fachberatungsstelle für Opfer von Jugendgewalt und berät sie sensibel darüber, wie sie eine Strafanzeige bei der Polizei erstatten können.</text:span></text:p>
      <text:p text:style-name="P4"><text:span text:style-name="Strong_20_Emphasis"><text:span text:style-name="T3">Sprecher 1:</text:span></text:span><text:span text:style-name="T4"> Und wie reagiert die Schule auf der offiziellen, rechtlichen Ebene?</text:span></text:p>
      <text:p text:style-name="P4"><text:span text:style-name="Strong_20_Emphasis"><text:span text:style-name="T3">Sprecher 2:</text:span></text:span><text:span text:style-name="T4"> Da der Verdacht auf Erpressung und sexualisierte Beleidigung erhärtet ist, schaltet die Schulleitung in den </text:span><text:span text:style-name="Strong_20_Emphasis"><text:span text:style-name="T3">Schritten 8, 10 und 11</text:span></text:span><text:span text:style-name="T4"> das Staatliche Schulamt sowie das zuständige polizeiliche Jugendkommissariat ein. Jedes weitere Vorgehen – sei es ein temporärer Schulausschluss von Jonas oder strafrechtliche Ermittlungen – erfolgt ab diesem Moment nur noch in enger Abstimmung mit der Schulaufsicht und der Polizei.</text:span></text:p>
      <text:p text:style-name="P4"><text:span text:style-name="Strong_20_Emphasis"><text:span text:style-name="T3">Sprecher 1:</text:span></text:span><text:span text:style-name="T4"> Ein komplexer Prozess, der aber zeigt: Wenn das Rädchen der 11 Schritte ineinandergreift, ist schneller Schutz für Betroffene garantiert. Vielen Dank für diese Einblicke!</text:span></text:p>
      <text:p text:style-name="Standard"/>
      <text:p text:style-name="Standard">Übergriffe von Lernenden untereinander im schulischen Bereich</text:p>
      <text:p text:style-name="Standard"/>
      <text:p text:style-name="Standard"/>
      <text:p text:style-name="Standard">1.</text:p>
      <text:p text:style-name="Standard">Wahrnehmung von Anhaltspunkten/Verdachtsmomenten von Gewalt, Machtmissbrauch oder sexualisierter Gewalt.</text:p>
      <text:p text:style-name="Standard">2.</text:p>
      <text:p text:style-name="Standard">Dokumentation von Beobachtungen bzw. Gespräch mit anvertrauender Person.</text:p>
      <text:p text:style-name="Standard">3.</text:p>
      <text:p text:style-name="Standard">Ggf. vertrauliche Beratung durch schulische Ansprechpersonen.</text:p>
      <text:p text:style-name="Standard">4.</text:p>
      <text:p text:style-name="Standard">Dokumentation des Gesprächs und ggf. Meldung des Vorfalls bei der Schulleitung. Konferenz zwischen Vertrauensperson, Klassenleitung, Abteilungsleitung und der Schulleitung.</text:p>
      <text:p text:style-name="Standard">5.</text:p>
      <text:p text:style-name="Standard">Gewährleistung erforderlicher Vertraulichkeit.</text:p>
      <text:p text:style-name="Standard">6.</text:p>
      <text:p text:style-name="Standard">Gespräche mit allen Beteiligten (bei Minderjährigen Erziehungsberechtigte einbeziehen) über Hilfsmaßnahmen, Sanktionen, pädagogische und Ordnungsmaßnahmen.</text:p>
      <text:p text:style-name="Standard">7.</text:p>
      <text:p text:style-name="Standard">Trennung von Opfer und Tatverdächtigem/n.</text:p>
      <text:p text:style-name="Standard">8.</text:p>
      <text:p text:style-name="Standard"><text:soft-page-break/>Ggf. Einbeziehung des Staatlichen Schulamts (SSA).</text:p>
      <text:p text:style-name="Standard">9.</text:p>
      <text:p text:style-name="Standard">Unterstützungsmaßnahmen für betroffene Lernende: Kontakte zu Hilfseinrichtungen herstellen; ggf. Beratung hinsichtlich Stellen einer Strafanzeige; ggf. Kontakt zu Eltern aufnehmen.</text:p>
      <text:p text:style-name="Standard">10.</text:p>
      <text:p text:style-name="Standard">Schulleitung meldet erhärteten Verdachtsfall je nach Schwere an Staatliches Schulamt und das zuständige Kommissariat.</text:p>
      <text:p text:style-name="Standard"/>
      <text:p text:style-name="Standard">11.</text:p>
      <text:p text:style-name="Standard">Weiteres Vorgehen in Absprache mit Schulaufsicht und der Polize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8T21:43:44.289425805</meta:creation-date>
    <dc:date>2026-05-18T21:51:39.456565686</dc:date>
    <meta:editing-duration>PT7M55S</meta:editing-duration>
    <meta:editing-cycles>1</meta:editing-cycles>
    <meta:document-statistic meta:table-count="0" meta:image-count="0" meta:object-count="0" meta:page-count="3" meta:paragraph-count="41" meta:word-count="646" meta:character-count="4872" meta:non-whitespace-character-count="4262"/>
    <meta:generator>LibreOffice/26.2.3.2$Linux_X86_64 LibreOffice_project/620$Build-2</meta:generator>
  </office:meta>
</office:document-meta>
</file>